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0.5pt" fo:font-weight="normal" officeooo:rsid="00083e44" style:font-size-asian="10.5pt" style:font-weight-asian="normal" style:font-size-complex="10.5pt" style:font-weight-complex="normal"/>
    </style:style>
    <style:style style:name="P2" style:family="paragraph" style:parent-style-name="Heading_20_2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3" style:family="paragraph" style:parent-style-name="Heading_20_3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6" style:family="paragraph" style:parent-style-name="Heading_20_2">
      <style:text-properties fo:font-size="10.5pt" fo:font-weight="normal" officeooo:rsid="00083e44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fo:font-size="10.5pt" fo:font-weight="normal" officeooo:rsid="00083e44" style:font-size-asian="10.5pt" style:font-weight-asian="normal" style:font-size-complex="10.5pt" style:font-weight-complex="normal"/>
    </style:style>
    <style:style style:name="P8" style:family="paragraph" style:parent-style-name="Heading_20_2">
      <style:text-properties officeooo:rsid="00083e44" officeooo:paragraph-rsid="00083e44"/>
    </style:style>
    <style:style style:name="P9" style:family="paragraph" style:parent-style-name="Heading_20_3">
      <style:text-properties officeooo:rsid="00083e44" officeooo:paragraph-rsid="00083e44"/>
    </style:style>
    <style:style style:name="P10" style:family="paragraph" style:parent-style-name="Quotations">
      <style:text-properties officeooo:rsid="00083e44" officeooo:paragraph-rsid="00083e44"/>
    </style:style>
    <style:style style:name="P11" style:family="paragraph" style:parent-style-name="Standard">
      <style:text-properties officeooo:rsid="00083e44" officeooo:paragraph-rsid="00083e44"/>
    </style:style>
    <style:style style:name="P12" style:family="paragraph" style:parent-style-name="Text_20_body">
      <style:text-properties officeooo:rsid="00083e44" officeooo:paragraph-rsid="00083e44"/>
    </style:style>
    <style:style style:name="P13" style:family="paragraph" style:parent-style-name="Quotations">
      <style:text-properties officeooo:paragraph-rsid="00083e44"/>
    </style:style>
    <style:style style:name="P14" style:family="paragraph" style:parent-style-name="Standard">
      <style:text-properties officeooo:paragraph-rsid="00083e44"/>
    </style:style>
    <style:style style:name="P15" style:family="paragraph" style:parent-style-name="Text_20_body">
      <style:text-properties officeooo:paragraph-rsid="00083e44"/>
    </style:style>
    <style:style style:name="P16" style:family="paragraph" style:parent-style-name="Standard">
      <style:text-properties fo:font-size="14pt" fo:font-weight="bold" officeooo:rsid="00083e44" officeooo:paragraph-rsid="00083e44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1.3999996185303pt" style:font-size-asian="10pt" style:font-size-complex="11.3999996185303pt"/>
    </style:style>
    <style:style style:name="P18" style:family="paragraph" style:parent-style-name="Text_20_body">
      <style:text-properties fo:font-size="11.3999996185303pt" officeooo:rsid="00083e44" officeooo:paragraph-rsid="00083e44" style:font-size-asian="10pt" style:font-size-complex="11.3999996185303pt"/>
    </style:style>
    <style:style style:name="P19" style:family="paragraph" style:parent-style-name="Heading_20_4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20" style:family="paragraph" style:parent-style-name="Heading_20_4">
      <style:text-properties fo:font-size="12pt" fo:font-weight="normal" officeooo:rsid="0009a64f" officeooo:paragraph-rsid="0009a64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>
      <style:text-properties fo:font-size="10.5pt" fo:font-weight="normal" officeooo:rsid="00083e44" officeooo:paragraph-rsid="00083e44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fo:font-size="10.5pt" fo:font-weight="normal" officeooo:rsid="00083e44" officeooo:paragraph-rsid="0009a64f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fo:font-size="10.5pt" fo:font-weight="normal" officeooo:rsid="0009a64f" officeooo:paragraph-rsid="0009a64f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officeooo:paragraph-rsid="0009a64f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paragraph-properties fo:margin-top="0cm" fo:margin-bottom="0cm" style:contextual-spacing="false"/>
    </style:style>
    <style:style style:name="P33" style:family="paragraph" style:parent-style-name="Text_20_body">
      <style:text-properties fo:font-size="12pt" fo:font-weight="normal" officeooo:rsid="0009a64f" officeooo:paragraph-rsid="0009a64f" style:font-size-asian="10.5pt" style:font-weight-asian="normal" style:font-size-complex="12pt" style:font-weight-complex="normal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083e44"/>
    </style:style>
    <style:style style:name="T2" style:family="text">
      <style:text-properties fo:font-size="10.5pt" fo:font-weight="normal" officeooo:rsid="00083e44" style:font-size-asian="10.5pt" style:font-weight-asian="normal" style:font-size-complex="10.5pt" style:font-weight-complex="normal"/>
    </style:style>
    <style:style style:name="T3" style:family="text">
      <style:text-properties fo:font-size="10.5pt" fo:font-weight="normal" officeooo:rsid="0009a64f" style:font-size-asian="10.5pt" style:font-weight-asian="normal" style:font-size-complex="10.5pt" style:font-weight-complex="normal"/>
    </style:style>
    <style:style style:name="T4" style:family="text">
      <style:text-properties officeooo:rsid="0009a64f"/>
    </style:style>
    <style:style style:name="T5" style:family="text">
      <style:text-properties fo:font-size="12pt" fo:font-weight="normal" officeooo:rsid="0009a64f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학년 1학기</text:p>
      <text:p text:style-name="P11">-스탯</text:p>
      <text:p text:style-name="P11">학점</text:p>
      <text:p text:style-name="P11">멘탈</text:p>
      <text:p text:style-name="P11">인간관계</text:p>
      <text:p text:style-name="P11">소지금 60 (주차 마다 -5)</text:p>
      <text:p text:style-name="P11"/>
      <text:p text:style-name="P11">1주차</text:p>
      <text:p text:style-name="P11">아침 10시쯤, 나는 노트북 앞에 앉아 있다.</text:p>
      <text:p text:style-name="P11">수강신청 오픈까지 앞으로 10초.</text:p>
      <text:p text:style-name="P11">“제발 성공하자…”</text:p>
      <text:p text:style-name="P12">3</text:p>
      <text:p text:style-name="Text_20_body">2</text:p>
      <text:p text:style-name="Text_20_body">1</text:p>
      <text:p text:style-name="Text_20_body">클릭!</text:p>
      <text:p text:style-name="P17">재빠르게 새로고침 버튼을 누른 것 같았지만, 이미 내가 원하던 대부분의 강의들을 놓치고 말았다…</text:p>
      <text:p text:style-name="P18">1. 자리가 남은 강의를 그냥 넣는다.</text:p>
      <text:p text:style-name="P18">→ 학점 +10, 멘탈 -10</text:p>
      <text:p text:style-name="P18">“어쩔 수 없지… 강의 사이에 우주 공강이 되어버렸지만 이미 벌어진 일이니까...”</text:p>
      <text:p text:style-name="P18">2. 학점이 좀 모자라지만 그냥 이대로 간다.</text:p>
      <text:p text:style-name="P18">→ 학점 +5, 멘탈 +5</text:p>
      <text:p text:style-name="P17">“어쩔 수 없지! 미래의 나에게 맡긴다!”</text:p>
      <text:p text:style-name="P11"/>
      <text:p text:style-name="P11">2주차</text:p>
      <text:p text:style-name="P12">따스한 봄바람이 불어오는 3월 초.</text:p>
      <text:p text:style-name="Text_20_body">오늘은 드디어 한성대학교 입학식 날이다.</text:p>
      <text:p text:style-name="Text_20_body">정문 앞에는 새내기들이 삼삼오오 모여 사진을 찍고 있었고, 교내의 곳곳에는 신입생들을 환영하는 현수막이 걸려 있었다.</text:p>
      <text:p text:style-name="Text_20_body">나는 강당으로 향했다.</text:p>
      <text:p text:style-name="Text_20_body">강당 안은 이미 많은 신입생들로 가득 차 있었다.</text:p>
      <text:p text:style-name="Text_20_body">빈자리를 찾아 앉으려던 순간.</text:p>
      <text:p text:style-name="Text_20_body">옆자리에 앉은 학생이 먼저 말을 걸어왔다.</text:p>
      <text:p text:style-name="Text_20_body">???</text:p>
      <text:p text:style-name="Quotations"><text:soft-page-break/>"저기… 안녕하세요?"</text:p>
      <text:p text:style-name="Text_20_body">조금 긴장한 표정의 학생이었다.</text:p>
      <text:p text:style-name="Text_20_body">나도 사실 아는 사람이 한 명도 없었다.</text:p>
      <text:p text:style-name="Text_20_body">어색한 침묵이 흐른다.</text:p>
      <text:p text:style-name="Text_20_body">어떻게 할까?</text:p>
      <text:h text:style-name="P9" text:outline-level="3">1. 먼저 웃으며 말을 건다.</text:h>
      <text:p text:style-name="Quotations">"네 안녕하세요!"</text:p>
      <text:p text:style-name="Quotations">"저도 아는 사람이 아무도 없어서 긴장되네요."</text:p>
      <text:p text:style-name="Text_20_body">학생의 표정이 밝아졌다.</text:p>
      <text:p text:style-name="Text_20_body">???</text:p>
      <text:p text:style-name="Quotations">"진짜요?"</text:p>
      <text:p text:style-name="Quotations">"다행이다..."</text:p>
      <text:p text:style-name="Text_20_body">그렇게 서로 이름을 소개하고 고등학교 이야기, 통학 시간 이야기 등을 나누기 시작했다.</text:p>
      <text:p text:style-name="Text_20_body">입학식이 끝난 후.</text:p>
      <text:p text:style-name="Quotations">"혹시 괜찮으면 연락처 교환할래요?"</text:p>
      <text:p text:style-name="Text_20_body">생애 첫 대학 친구가 생겼다.</text:p>
      <text:p text:style-name="Text_20_body">결과</text:p>
      <text:p text:style-name="Text_20_body">→ 인간관계 +10</text:p>
      <text:p text:style-name="Text_20_body">→ 멘탈 +5</text:p>
      <text:p text:style-name="Quotations">"생각보다 대학 생활도 나쁘지 않을지도?"</text:p>
      <text:h text:style-name="Heading_20_3" text:outline-level="3">2. 간단하게만 대답한다.</text:h>
      <text:p text:style-name="Quotations">"아... 네."</text:p>
      <text:p text:style-name="Quotations">"아하..."</text:p>
      <text:p text:style-name="Text_20_body">짧은 대화가 끝나고 어색한 침묵이 이어진다.</text:p>
      <text:p text:style-name="Text_20_body">입학식은 무사히 끝났지만 특별한 일은 없었다.</text:p>
      <text:p text:style-name="Text_20_body"><text:soft-page-break/>결과</text:p>
      <text:p text:style-name="Text_20_body">→ 변화 없음</text:p>
      <text:p text:style-name="Quotations">"뭐... 아직 학기 시작도 안 했으니까."</text:p>
      <text:h text:style-name="P9" text:outline-level="3">3. 못들은 척 휴대폰을 본다.</text:h>
      <text:p text:style-name="Text_20_body">학생은 잠시 머뭇거리더니 고개를 돌렸다.</text:p>
      <text:p text:style-name="Quotations">"...아."</text:p>
      <text:p text:style-name="Text_20_body">괜히 조금 미안해졌다.</text:p>
      <text:p text:style-name="Text_20_body">하지만 적어도 어색한 대화는 하지 않아도 됐다.</text:p>
      <text:p text:style-name="Text_20_body">입학식이 끝난 후 곧바로 집으로 향했다.</text:p>
      <text:p text:style-name="Text_20_body">결과</text:p>
      <text:p text:style-name="Text_20_body">→ 인간관계 -5</text:p>
      <text:p text:style-name="Text_20_body">→ 멘탈 +5</text:p>
      <text:p text:style-name="P11"/>
      <text:p text:style-name="P11">3주차</text:p>
      <text:p text:style-name="P12">입학식이 끝난 지도 어느덧 일주일.</text:p>
      <text:p text:style-name="Text_20_body">강의실 위치를 헷갈리는 일도 조금씩 줄어들고, 교수님들의 이름도 하나둘 외워가기 시작했다.</text:p>
      <text:p text:style-name="Text_20_body">점심시간.</text:p>
      <text:p text:style-name="Text_20_body">오늘 학교 안은 평소와는 비교도 안 될 정도로 시끄러웠다.</text:p>
      <text:p text:style-name="Text_20_body">천막들이 길게 늘어서 있었고, 각 부스에서는 선배들이 목이 터져라 홍보를 하고 있었다.</text:p>
      <text:p text:style-name="P10">"동아리 구경하고 가세요!"</text:p>
      <text:p text:style-name="Quotations">"신입생 무료 간식 증정!"</text:p>
      <text:p text:style-name="Quotations">"이번에 신입 부원 많이 뽑습니다!"</text:p>
      <text:p text:style-name="Quotations">"재밌어요! 한번 보고 가세요<text:span text:style-name="T1">~</text:span>"</text:p>
      <text:p text:style-name="P12">나는 손에 전단지 몇 장을 들고 광장을 천천히 걸었다.</text:p>
      <text:p text:style-name="Text_20_body">생각보다 동아리 종류가 엄청 많았다.</text:p>
      <text:p text:style-name="P10">"대학교 하면 역시 동아리지..."</text:p>
      <text:p text:style-name="Quotations">"근데 괜히 가입했다가 시간만 뺏기는 거 아닐까?"</text:p>
      <text:p text:style-name="P12"><text:soft-page-break/>그때.</text:p>
      <text:p text:style-name="Text_20_body">한 선배가 다가왔다.</text:p>
      <text:p text:style-name="Quotations">"신입생이죠?"</text:p>
      <text:p text:style-name="P11"><text:tab/>“우리 동아리 한번 보고 가요!" </text:p>
      <text:p text:style-name="P12">나는 잠시 고민했다.</text:p>
      <text:p text:style-name="Text_20_body">대학교 생활을 더 재밌게 만들어 줄 수도 있고,</text:p>
      <text:p text:style-name="Text_20_body">반대로 시간을 빼앗길 수도 있다.</text:p>
      <text:p text:style-name="Text_20_body">어떤 선택을 할까?</text:p>
      <text:h text:style-name="Heading_20_2" text:outline-level="2">1. 따라 간다</text:h>
      <text:p text:style-name="Text_20_body">커다란 스피커에서 밴드 음악이 흘러나오고 있었다.</text:p>
      <text:p text:style-name="Text_20_body">부스 앞에는 기타와 드럼 사진들이 붙어 있었다.</text:p>
      <text:p text:style-name="Quotations">"안녕하세요!"</text:p>
      <text:p text:style-name="P13">"음악 좋아하세요?"</text:p>
      <text:p text:style-name="P13">"좋아하긴 하는데..."</text:p>
      <text:p text:style-name="Quotations">"악기는 할 줄 모르는데요."</text:p>
      <text:p text:style-name="Quotations">"괜찮아요."</text:p>
      <text:p text:style-name="Quotations">"잘 할 줄 몰라도 가입할 수 있어요."</text:p>
      <text:p text:style-name="Text_20_body">옆에서는 선배들이 공연 영상을 보여주고 있었다.</text:p>
      <text:p text:style-name="Text_20_body">축제 무대 위에서 연주하는 모습.</text:p>
      <text:p text:style-name="Text_20_body">관객들의 함성.</text:p>
      <text:p text:style-name="Text_20_body">생각보다 엄청 멋있어 보였다.</text:p>
      <text:p text:style-name="Quotations">"한번 놀러 와도 돼요."</text:p>
      <text:p text:style-name="Quotations">"연습 구경도 가능해요."</text:p>
      <text:p text:style-name="Text_20_body">나도 모르게 가입 신청서를 작성했다.</text:p>
      <text:p text:style-name="Text_20_body">결과</text:p>
      <text:p text:style-name="Text_20_body"><text:soft-page-break/>→ 인간관계 +10</text:p>
      <text:p text:style-name="Text_20_body">→ 멘탈 +5</text:p>
      <text:p text:style-name="Text_20_body"/>
      <text:p text:style-name="Text_20_body"/>
      <text:p text:style-name="Text_20_body"/>
      <text:h text:style-name="P8" text:outline-level="2">2. 그냥 지나친다</text:h>
      <text:p text:style-name="Text_20_body">나는 한참 동안 광장을 둘러봤지만 결국 어느 부스에도 가입하지 않았다.</text:p>
      <text:p text:style-name="Quotations">"일단 대학 생활부터 적응하자."</text:p>
      <text:p text:style-name="Quotations">"괜히 이것저것 했다가 감당 못 하면 어떡해."</text:p>
      <text:p text:style-name="Text_20_body">집으로 돌아와 침대에 누웠다.</text:p>
      <text:p text:style-name="P12">결과</text:p>
      <text:p text:style-name="Text_20_body">→ 멘탈 +5</text:p>
      <text:p text:style-name="Text_20_body">→ 인간관계 -10</text:p>
      <text:p text:style-name="P11"/>
      <text:p text:style-name="P11"/>
      <text:p text:style-name="P11">4주차.</text:p>
      <text:p text:style-name="P12">입학한 지 어느덧 한 달.</text:p>
      <text:p text:style-name="Text_20_body">처음에는 모든 것이 신기하고 즐거웠지만, 슬슬 대학 생활의 현실이 모습을 드러내기 시작했다.</text:p>
      <text:p text:style-name="P12">월요일 오전.</text:p>
      <text:p text:style-name="Text_20_body">교양 수업이 끝나갈 무렵.</text:p>
      <text:p text:style-name="Text_20_body">교수님은 노트북을 닫으며 말했다.</text:p>
      <text:p text:style-name="P11">"자, 다음 주까지 과제 하나 제출해 주세요." </text:p>
      <text:p text:style-name="P11">강의실 여기저기서 탄식이 들려왔다. </text:p>
      <text:p text:style-name="P11">사실 그렇게 들렸다라고 할 수는 없었으나 모두가 나와 같은 생각이였을것이다.</text:p>
      <text:p text:style-name="P11">오후 전공 수업. </text:p>
      <text:p text:style-name="P11">"그리고 여러분은 이번 주부터 프로젝트를 진행합니다." </text:p>
      <text:p text:style-name="P11">또 다른 수업. </text:p>
      <text:p text:style-name="P11">"이번주까지 보고서 작성 과제 있습니다." </text:p>
      <text:p text:style-name="P11">"분량은 A4 10페이지 이상입니다." </text:p>
      <text:p text:style-name="P11">“또인가…”</text:p>
      <text:p text:style-name="P12">나는 수업이 끝난 뒤 상상관 로비 의자에 앉아 과제 현황을 확인했다.</text:p>
      <text:p text:style-name="P12"><text:soft-page-break/>과제 현황</text:p>
      <text:list text:style-name="L1">
        <text:list-item>
          <text:p text:style-name="P23">교양 과제 1개 </text:p>
        </text:list-item>
        <text:list-item>
          <text:p text:style-name="P23">전공 과제 2개 </text:p>
        </text:list-item>
        <text:list-item>
          <text:p text:style-name="P23">발표 자료 제작 </text:p>
        </text:list-item>
        <text:list-item>
          <text:p text:style-name="P22">팀플 회의 준비 </text:p>
        </text:list-item>
      </text:list>
      <text:p text:style-name="P12"/>
      <text:p text:style-name="P12">마감까지 남은 시간은 일주일.</text:p>
      <text:p text:style-name="Text_20_body">어떻게 할까?</text:p>
      <text:h text:style-name="P8" text:outline-level="2">1. 오늘부터 바로 시작한다</text:h>
      <text:p text:style-name="Text_20_body">그날 저녁.</text:p>
      <text:p text:style-name="Text_20_body">집에 도착하자마자 노트북을 켰다.</text:p>
      <text:p text:style-name="Quotations">"미래의 나를 믿지 말자."</text:p>
      <text:p text:style-name="Quotations">"지금 하는 게 맞다."</text:p>
      <text:p text:style-name="P15">친구들이 게임하자는 연락을 보냈지만 전부 거절했다.</text:p>
      <text:p text:style-name="P15"><text:s text:c="9"/>"롤 ㄱ?"</text:p>
      <text:p text:style-name="Quotations">"과제해야 함."</text:p>
      <text:p text:style-name="Quotations">"벌써 해?”</text:p>
      <text:p text:style-name="Text_20_body">며칠 동안 꾸준히 과제를 진행했다.</text:p>
      <text:p text:style-name="Text_20_body">힘들긴 했지만 마감 하루 전 모든 과제를 끝낼 수 있었다.</text:p>
      <text:p text:style-name="Text_20_body">결과</text:p>
      <text:p text:style-name="Text_20_body">→ 학점 +15</text:p>
      <text:p text:style-name="Text_20_body">→ 멘탈 -10</text:p>
      <text:p text:style-name="Quotations">"힘들긴 했지만... 역시 미리 하길 잘했어."</text:p>
      <text:p text:style-name="Text_20_body"/>
      <text:h text:style-name="P8" text:outline-level="2">2. 마감 전날 밤에 몰아서 한다</text:h>
      <text:p text:style-name="Text_20_body">과제는 미래의 나에게 맡겼다.</text:p>
      <text:p text:style-name="Text_20_body"><text:soft-page-break/>월요일. </text:p>
      <text:p text:style-name="P11">"아직 많이 남았네." </text:p>
      <text:p text:style-name="P11">수요일.</text:p>
      <text:p text:style-name="P11">"괜찮아." </text:p>
      <text:p text:style-name="P11">금요일. </text:p>
      <text:p text:style-name="P11">"내일 하면 되지." </text:p>
      <text:p text:style-name="P11">그리고 마감 전날 밤. </text:p>
      <text:p text:style-name="P12">현재 시간</text:p>
      <text:p text:style-name="Text_20_body">오후 11시 43분</text:p>
      <text:p text:style-name="Text_20_body">"...망했다." </text:p>
      <text:p text:style-name="Text_20_body">분량은 절반도 못 채웠다.</text:p>
      <text:p text:style-name="Text_20_body">자료 조사도 안 했다.</text:p>
      <text:p text:style-name="Text_20_body">발표 자료도 비어 있다.</text:p>
      <text:p text:style-name="Text_20_body">새벽 2시. </text:p>
      <text:p text:style-name="Text_20_body">새벽 4시. </text:p>
      <text:p text:style-name="P11">아침 8시. </text:p>
      <text:p text:style-name="P11">결국 겨우 제출에는 성공했다. </text:p>
      <text:p text:style-name="P11">다만 내용이 빈약한 것은 당연한 결과였다.</text:p>
      <text:p text:style-name="P11"/>
      <text:p text:style-name="P12">결과</text:p>
      <text:p text:style-name="Text_20_body">→ 학점 +5</text:p>
      <text:p text:style-name="Text_20_body">→ 멘탈 -20</text:p>
      <text:p text:style-name="P11">"다음부터는 진짜 미리 해야지." </text:p>
      <text:p text:style-name="P11"/>
      <text:p text:style-name="P16">4. AI를 적극 활용한다</text:p>
      <text:p text:style-name="P4">"요즘은 AI 시대잖아." </text:p>
      <text:p text:style-name="P5">과제 주제를 입력했다.</text:p>
      <text:p text:style-name="Text_20_body">몇 초 만에 초안이 완성되었다.</text:p>
      <text:p text:style-name="P5">생각보다 훨씬 괜찮았다.</text:p>
      <text:p text:style-name="Text_20_body">하지만 그대로 제출하기엔 조금 부족했다.</text:p>
      <text:h text:style-name="Heading_20_3" text:outline-level="3"><text:soft-page-break/>추가 선택</text:h>
      <text:h text:style-name="Heading_20_4" text:outline-level="4">① AI 내용을 직접 수정한다 <text:span text:style-name="T1">(멘탈 35이상)</text:span></text:h>
      <text:p text:style-name="Text_20_body">AI가 만든 내용을 참고해 자신만의 내용으로 수정했다.</text:p>
      <text:p text:style-name="Text_20_body">생각보다 더 좋은 평을 받았다!</text:p>
      <text:p text:style-name="P5">결과</text:p>
      <text:p text:style-name="Text_20_body">→ 학점 +12</text:p>
      <text:p text:style-name="Text_20_body">→ 멘탈 -3</text:p>
      <text:h text:style-name="Heading_20_4" text:outline-level="4">② 그대로 제출한다</text:h>
      <text:p text:style-name="Text_20_body">“그래 그냥 제출해버리자.”</text:p>
      <text:p text:style-name="Text_20_body">며칠 후…</text:p>
      <text:p text:style-name="Text_20_body">생각보다 좋지 않은 평가를 받았다… </text:p>
      <text:p text:style-name="Text_20_body">가장 중요한 내용을 빠뜨린 것 같다… </text:p>
      <text:p text:style-name="Text_20_body">결과</text:p>
      <text:p text:style-name="Text_20_body">→ 학점 -15</text:p>
      <text:p text:style-name="Text_20_body">→ 멘탈 -10<text:line-break/></text:p>
      <text:h text:style-name="Heading_20_2" text:outline-level="2">특별 이벤트</text:h>
      <text:p text:style-name="Text_20_body">인간관계 70 이상일 경우 발생</text:p>
      <text:p text:style-name="Text_20_body"/>
      <text:p text:style-name="Text_20_body">갑자기 휴대폰에서 문자 알림음이 울려왔다.</text:p>
      <text:p text:style-name="Text_20_body">"과제 다 했어?" </text:p>
      <text:p text:style-name="Text_20_body">"아직..." </text:p>
      <text:p text:style-name="Text_20_body">"나도 지금 하는 중인데 같이 할래?" </text:p>
      <text:p text:style-name="P4">카페에서 함께 과제를 하며 자연스럽게 대화가 이어졌다. </text:p>
      <text:p text:style-name="P5">결과</text:p>
      <text:p text:style-name="Text_20_body">→ 인간관계 +5</text:p>
      <text:p text:style-name="Text_20_body">→ 멘탈 +5</text:p>
      <text:p text:style-name="P4">→ +친구 찬스 1회</text:p>
      <text:p text:style-name="P4"><text:soft-page-break/></text:p>
      <text:p text:style-name="P4">… 7~8주차</text:p>
      <text:p text:style-name="P5">입학한 지 한 달 반.</text:p>
      <text:p text:style-name="Text_20_body">벚꽃은 어느새 지고, 캠퍼스에는 초록빛이 가득해졌다.</text:p>
      <text:p text:style-name="Text_20_body">학생들은 점점 분주해지고 있다.</text:p>
      <text:p text:style-name="P5">월요일 오전.</text:p>
      <text:p text:style-name="Text_20_body">전공 수업이 끝나갈 무렵.</text:p>
      <text:p text:style-name="Text_20_body">교수님이 조용히 말했다.</text:p>
      <text:p text:style-name="P4">"다음 주가 중간고사 기간입니다." </text:p>
      <text:p text:style-name="P4">집에 도착한 나는 시험 일정을 확인했다.</text:p>
      <text:p text:style-name="P5">시험 일정</text:p>
      <text:list text:style-name="L2">
        <text:list-item>
          <text:p text:style-name="P24">교양 과목 <text:span text:style-name="T1">3</text:span>개 </text:p>
        </text:list-item>
        <text:list-item>
          <text:p text:style-name="P24">전공 과목 <text:span text:style-name="T1">2</text:span>개 </text:p>
        </text:list-item>
      </text:list>
      <text:p text:style-name="Text_20_body">나는 책상 위에 쌓인 프린트와 교재를 바라봤다.</text:p>
      <text:p text:style-name="Text_20_body">지금부터 어떻게 공부하느냐에 따라 첫 대학 성적이 결정될 것이다.</text:p>
      <text:p text:style-name="Text_20_body">어떻게 할까?</text:p>
      <text:p text:style-name="Text_20_body"/>
      <text:h text:style-name="Heading_20_2" text:outline-level="2">1. 도서관에 틀어박혀 공부한다 </text:h>
      <text:p text:style-name="P12">(멘탈 50이상)</text:p>
      <text:p text:style-name="Text_20_body">다음 날.</text:p>
      <text:p text:style-name="Text_20_body">아침 <text:span text:style-name="T1">10</text:span>시.</text:p>
      <text:p text:style-name="Text_20_body">"제발 자리 있어라..." </text:p>
      <text:p text:style-name="P4">다행히 구석 자리를 하나 발견했다. </text:p>
      <text:p text:style-name="P5">그 후 며칠 동안.</text:p>
      <text:p text:style-name="Text_20_body">수업이 끝나면 도서관.</text:p>
      <text:p text:style-name="Text_20_body">밥 먹고 도서관.</text:p>
      <text:p text:style-name="Text_20_body">집 가서 도서관.</text:p>
      <text:p text:style-name="P5">며칠 동안 거의 사람을 만나지 않았다.</text:p>
      <text:p text:style-name="Text_20_body">하지만 공부량은 확실히 늘었다.</text:p>
      <text:p text:style-name="P4">시험 당일. </text:p>
      <text:p text:style-name="P4"><text:soft-page-break/>문제를 보는 순간. </text:p>
      <text:p text:style-name="P4">생각보다 술술 풀렸다. </text:p>
      <text:p text:style-name="P14"><text:span text:style-name="T2"><text:s text:c="11"/>“</text:span>어?"</text:p>
      <text:p text:style-name="Quotations">"이거 어제 본 건데?"</text:p>
      <text:p text:style-name="P5">결과</text:p>
      <text:p text:style-name="Text_20_body">→ 학점 +20</text:p>
      <text:p text:style-name="Text_20_body">→ 멘탈 -15</text:p>
      <text:p text:style-name="Text_20_body">→ 인간관계 -5</text:p>
      <text:p text:style-name="P4">"살았다..." </text:p>
      <text:p text:style-name="P4"/>
      <text:p text:style-name="P4"/>
      <text:h text:style-name="P2" text:outline-level="2">2. 친구들과 스터디를 한다</text:h>
      <text:p text:style-name="P5">(인간관계 40 이상 or 친구 찬스 보유)</text:p>
      <text:p text:style-name="Text_20_body">학생회관 카페.</text:p>
      <text:p text:style-name="Text_20_body">동기 두 명이 앉아 있다.</text:p>
      <text:p text:style-name="P4">"야 이거 이해한 사람?" </text:p>
      <text:p text:style-name="P4">"나도 모르겠음." </text:p>
      <text:p text:style-name="P4">"수업 시간에 잤냐?" </text:p>
      <text:p text:style-name="P4">스터디는 생각보다 도움이 됐다.</text:p>
      <text:p text:style-name="Text_20_body">내가 모르는 부분은 친구들이 알려주고,</text:p>
      <text:p text:style-name="Text_20_body">친구들이 모르는 부분은 내가 알려주었다.</text:p>
      <text:p text:style-name="P4">시험 당일. </text:p>
      <text:p text:style-name="P4">몇몇 문제는 생각보다 쉽게 풀렸다.</text:p>
      <text:p text:style-name="P5">결과</text:p>
      <text:p text:style-name="Text_20_body">→ 학점 +1<text:span text:style-name="T1">0</text:span></text:p>
      <text:p text:style-name="Text_20_body">→ 인간관계 +10</text:p>
      <text:p text:style-name="Text_20_body">→ 멘탈 -5</text:p>
      <text:p text:style-name="P4">"혼자 하는 것보다 훨씬 낫네." </text:p>
      <text:p text:style-name="P4"/>
      <text:p text:style-name="P4"/>
      <text:p text:style-name="P4">3. 벼락치기를 한다</text:p>
      <text:p text:style-name="P4">"아직 1학년 1학기인데 좀 놀아도 되지 않을까?" </text:p>
      <text:p text:style-name="P4">월요일 </text:p>
      <text:p text:style-name="P7">"아직 시간 많네." </text:p>
      <text:p text:style-name="P7">수요일 </text:p>
      <text:p text:style-name="P7"><text:soft-page-break/>"주말에 하면 되지." </text:p>
      <text:p text:style-name="P7">금요일 </text:p>
      <text:p text:style-name="P7">"진짜 해야 하는데..." </text:p>
      <text:p text:style-name="P7">일요일 밤. </text:p>
      <text:p text:style-name="P7">현재 시각</text:p>
      <text:p text:style-name="Text_20_body">오후 11시 57분</text:p>
      <text:p text:style-name="P7">"..." </text:p>
      <text:p text:style-name="P7">교재를 펼쳐보니 처음 보는 내용이 절반이었다. </text:p>
      <text:p text:style-name="P7">새벽 3시. </text:p>
      <text:p text:style-name="P7">새벽 5시. </text:p>
      <text:p text:style-name="P7">"잠깐만 눈만 감자..." </text:p>
      <text:p text:style-name="P7">시험장. </text:p>
      <text:p text:style-name="P7">첫 문제를 읽었다. </text:p>
      <text:p text:style-name="P7">"이거 어디서 본 것 같은데..." </text:p>
      <text:p text:style-name="P7">"어 다시 보니까 아닌 것 같기도..." </text:p>
      <text:p text:style-name="P7">결국 절반도 풀지 못했다. </text:p>
      <text:p text:style-name="P7">결과</text:p>
      <text:p text:style-name="Text_20_body">→ 학점 -10</text:p>
      <text:p text:style-name="Text_20_body">→ 멘탈 -20</text:p>
      <text:p text:style-name="P7">"다음 시험부터는 진짜 미리 공부한다." </text:p>
      <text:p text:style-name="P7"/>
      <text:p text:style-name="P7"/>
      <text:h text:style-name="P1" text:outline-level="1">9주차</text:h>
      <text:p text:style-name="Text_20_body">드디어 마지막 시험이 끝났다.</text:p>
      <text:p text:style-name="P7">며칠 동안 밤늦게까지 공부하느라 피곤이 쌓여 있었다.</text:p>
      <text:p text:style-name="Text_20_body">하지만 동시에 엄청난 해방감도 느껴졌다.</text:p>
      <text:p text:style-name="P7">"오늘 저녁에 다 같이 술 마시러 갈 건데?" </text:p>
      <text:p text:style-name="P7">"시험 끝났는데 이 정도는 해야지." </text:p>
      <text:p text:style-name="P7">한편, 통장 잔고도 조금 신경 쓰였다.</text:p>
      <text:p text:style-name="Text_20_body"><text:soft-page-break/>입학 후 교재비, 식비, 교통비를 쓰다 보니 생각보다 돈이 많이 줄어들었다.</text:p>
      <text:p text:style-name="P7">"음..." </text:p>
      <text:p text:style-name="P7">"오늘은 뭘 할까?" </text:p>
      <text:h text:style-name="P6" text:outline-level="2">1. 술자리에 참석한다 (소지금 30 이상)</text:h>
      <text:p text:style-name="Text_20_body">저녁 7시.</text:p>
      <text:p text:style-name="Text_20_body">학교 근처 술집.</text:p>
      <text:p text:style-name="Text_20_body">이미 동기들이 여러 명 모여 있었다.</text:p>
      <text:p text:style-name="Text_20_body">테이블에는 치킨과 안주가 가득 놓여 있었다. </text:p>
      <text:p text:style-name="P7">술자리는 생각보다 즐거웠다.</text:p>
      <text:p text:style-name="Text_20_body">입학 후 처음으로 편하게 이야기하는 시간이었다.</text:p>
      <text:p text:style-name="Text_20_body">그날 집에 돌아온 시간은 밤 12시가 넘어서였다.</text:p>
      <text:p text:style-name="Text_20_body">몸은 조금 피곤했지만, 사람들과 한층 가까워진 느낌이 들었다.</text:p>
      <text:p text:style-name="Text_20_body">결과</text:p>
      <text:p text:style-name="Text_20_body">→ 인간관계 +15</text:p>
      <text:p text:style-name="Text_20_body">→ 멘탈 -5</text:p>
      <text:p text:style-name="Text_20_body">"가끔은 이런 시간도 필요한 것 같다." </text:p>
      <text:p text:style-name="Text_20_body"/>
      <text:p text:style-name="Text_20_body"><text:span text:style-name="T1">2. </text:span>혼자 휴식한다 <text:span text:style-name="T1">(멘탈 20 이하)</text:span></text:p>
      <text:p text:style-name="P7">"오늘은 좀 쉬고 싶다." </text:p>
      <text:p text:style-name="P7">집에 돌아오자마자 침대에 누웠다.</text:p>
      <text:p text:style-name="Text_20_body">알람도 끄고.</text:p>
      <text:p text:style-name="Text_20_body">과제도 생각하지 않고.</text:p>
      <text:p text:style-name="Text_20_body">시험 결과도 잊어버렸다.</text:p>
      <text:p text:style-name="P7">유튜브를 보다가 잠들고.</text:p>
      <text:p text:style-name="Text_20_body">눈을 뜨니 저녁이었다.</text:p>
      <text:p text:style-name="P7">"몇 시간이나 잔 거지?" </text:p>
      <text:p text:style-name="P5">오랜만에 아무 생각도 하지 않았다. </text:p>
      <text:p text:style-name="P5">밤이 되자 피로가 많이 사라진 느낌이었다. </text:p>
      <text:p text:style-name="P5"><text:soft-page-break/>"이게 행복이지." </text:p>
      <text:p text:style-name="P5">결과</text:p>
      <text:p text:style-name="Text_20_body">→ 멘탈 +15</text:p>
      <text:p text:style-name="P5"/>
      <text:h text:style-name="P2" text:outline-level="2">3. 아르바이트를 시작한다</text:h>
      <text:p text:style-name="Text_20_body">시험이 끝난 다음 날.</text:p>
      <text:p text:style-name="Text_20_body">나는 아르바이트 공고를 찾아보기 시작했다.</text:p>
      <text:p text:style-name="P5">"이제 슬슬 돈도 벌어야지." </text:p>
      <text:p text:style-name="P5">며칠 뒤.</text:p>
      <text:p text:style-name="Text_20_body">학교 근처 카페.</text:p>
      <text:p text:style-name="P5">"경력은 없죠?" </text:p>
      <text:p text:style-name="P5">"네." </text:p>
      <text:p text:style-name="P5">"괜찮아요. 배우면 돼요." </text:p>
      <text:p text:style-name="P5">그렇게 첫 아르바이트가 시작되었다. </text:p>
      <text:p text:style-name="P5">첫날. </text:p>
      <text:p text:style-name="P5">"아이스 아메리카노 두 잔이요." </text:p>
      <text:p text:style-name="P5">"네!" </text:p>
      <text:p text:style-name="P5">"그쪽 말고 저쪽 손님 거." </text:p>
      <text:p text:style-name="P5">"...아." </text:p>
      <text:p text:style-name="P5">생각보다 쉽지 않았다.</text:p>
      <text:p text:style-name="Text_20_body">하지만 퇴근 후 받은 첫 월급 일부를 보니 기분이 좋아졌다.</text:p>
      <text:p text:style-name="Text_20_body">"내가 번 돈이다..." </text:p>
      <text:p text:style-name="P5">결과</text:p>
      <text:p text:style-name="Text_20_body">→ 소지금 +20</text:p>
      <text:p text:style-name="Text_20_body">→ 멘탈 -<text:span text:style-name="T1">10</text:span></text:p>
      <text:p text:style-name="P5">"힘들긴 해도 지갑이 두툼해지는 느낌은 좋네." </text:p>
      <text:p text:style-name="P5"/>
      <text:p text:style-name="P5"/>
      <text:h text:style-name="P3" text:outline-level="3"><text:soft-page-break/>이벤트</text:h>
      <text:p text:style-name="Text_20_body">소지금이 50만원 이상일 경우</text:p>
      <text:p text:style-name="P5">"야." </text:p>
      <text:p text:style-name="P5">"왜?" </text:p>
      <text:p text:style-name="P5">"너 요즘 돈 좀 있는 것 같던데." </text:p>
      <text:p text:style-name="P5">"그럼 오늘 밥은 네가 사는 거지?" </text:p>
      <text:p text:style-name="P5"/>
      <text:p text:style-name="P5">1. 밥을 산다</text:p>
      <text:p text:style-name="Text_20_body">→ 인간관계 +10</text:p>
      <text:p text:style-name="Text_20_body">→ 소지금 -<text:span text:style-name="T1">5</text:span></text:p>
      <text:p text:style-name="Text_20_body">"대학생의 지갑은 언제나 가볍다..." </text:p>
      <text:p text:style-name="Text_20_body"/>
      <text:p text:style-name="Text_20_body"><text:span text:style-name="T1">2. </text:span>도망간다</text:p>
      <text:p text:style-name="Text_20_body">→ 인간관계 -5</text:p>
      <text:p text:style-name="Text_20_body">→ 멘탈 +5</text:p>
      <text:p text:style-name="Text_20_body">“뭐라는거야… 나도 쓰기엔 부족하다고… ”</text:p>
      <text:p text:style-name="P5"/>
      <text:p text:style-name="P5"/>
      <text:p text:style-name="P5">10주차</text:p>
      <text:p text:style-name="P5">중간고사가 끝난 후.</text:p>
      <text:p text:style-name="Text_20_body">한동안 조용했던 캠퍼스 분위기가 갑자기 달라지기 시작했다.</text:p>
      <text:p text:style-name="Text_20_body"><text:s/>곳곳에 커다란 현수막이 걸렸고, 운동장에는 무대 설치 공사가 한창이었다.</text:p>
      <text:p text:style-name="P5">한성대학교 대동제 D-3 </text:p>
      <text:p text:style-name="P5">나는 무대가 세워지고 있는 운동장을 바라보았다.</text:p>
      <text:p text:style-name="Text_20_body">입학한 이후 처음 맞이하는 대학 축제.</text:p>
      <text:p text:style-name="Text_20_body">고등학교 축제와는 비교도 안되는 것 같았다.</text:p>
      <text:p text:style-name="P5">"대학교 축제..." </text:p>
      <text:p text:style-name="P5">"한 번쯤 제대로 즐겨보고 싶긴 한데." </text:p>
      <text:p text:style-name="P5">축제가 시작되는 날.</text:p>
      <text:p text:style-name="Text_20_body"><text:soft-page-break/>학교는 평소와 완전히 다른 모습이었다.</text:p>
      <text:p text:style-name="Text_20_body">푸드트럭.</text:p>
      <text:p text:style-name="Text_20_body">주점.</text:p>
      <text:p text:style-name="Text_20_body">체험 부스.</text:p>
      <text:p text:style-name="Text_20_body">공연 준비 중인 사람들.</text:p>
      <text:p text:style-name="Text_20_body">수많은 학생들.</text:p>
      <text:p text:style-name="P5">"그래서 오늘은 뭐를 할까?" </text:p>
      <text:p text:style-name="P5"/>
      <text:p text:style-name="P5"/>
      <text:p text:style-name="P5"><text:span text:style-name="T4">1. </text:span>동기들과 축제를 마음껏 즐긴다<text:span text:style-name="T4">(인간관계 40이상)</text:span></text:p>
      <text:p text:style-name="P5">"오늘은 놀자." </text:p>
      <text:p text:style-name="P5">동기들과 함께 축제 부스를 돌아다니기 시작했다.</text:p>
      <text:p text:style-name="Text_20_body">게임도 하고.</text:p>
      <text:p text:style-name="Text_20_body">푸드트럭 음식도 먹었다.</text:p>
      <text:p text:style-name="P5">해가 지기 시작할 무렵.</text:p>
      <text:p text:style-name="Text_20_body">무대 앞에는 이미 수많은 학생들이 모여 있었다.</text:p>
      <text:p text:style-name="Text_20_body">"빨리 가자!" </text:p>
      <text:p text:style-name="P5">공연이 시작되고.</text:p>
      <text:p text:style-name="Text_20_body">관객들의 함성이 울려 퍼졌다.</text:p>
      <text:p text:style-name="P5">"와..." </text:p>
      <text:p text:style-name="P5">나는 어느새 친구들과 함께 노래를 따라 부르고 있었다. </text:p>
      <text:p text:style-name="P5">축제가 끝난 후. </text:p>
      <text:p text:style-name="P5">"오늘 진짜 재밌었다." </text:p>
      <text:p text:style-name="P5">결과</text:p>
      <text:p text:style-name="Text_20_body">→ 인간관계 +15</text:p>
      <text:p text:style-name="Text_20_body">→ 멘탈 +15</text:p>
      <text:p text:style-name="Text_20_body">→ 소지금 -<text:span text:style-name="T4">10</text:span></text:p>
      <text:p text:style-name="P5">생각보다 더 즐거운 경험이였다.</text:p>
      <text:p text:style-name="P26"><text:soft-page-break/><text:span text:style-name="T4">2.</text:span> 동아리 사람들과 함께한다 <text:span text:style-name="T4">(동아리 가입 시)</text:span></text:p>
      <text:p text:style-name="P26">동아리 단톡방 </text:p>
      <text:p text:style-name="P26">"오늘 다 같이 축제 보러 갈 사람?" </text:p>
      <text:p text:style-name="P26">나는 동아리 사람들과 합류했다. </text:p>
      <text:p text:style-name="P26">"신입생 적응은 잘 하고 있어?" </text:p>
      <text:p text:style-name="P26">"생각보다 힘들어요." </text:p>
      <text:p text:style-name="P26">"원래 다 그래. 괜찮아, 차차 익숙해지겠지." </text:p>
      <text:p text:style-name="P26">처음에는 어색했지만.</text:p>
      <text:p text:style-name="Text_20_body">같이 공연을 보고.</text:p>
      <text:p text:style-name="Text_20_body">같이 저녁을 먹고.</text:p>
      <text:p text:style-name="Text_20_body">같이 사진도 찍었다.</text:p>
      <text:p text:style-name="P26">어느새 자연스럽게 대화에 섞여 있었다. </text:p>
      <text:p text:style-name="P26">결과</text:p>
      <text:p text:style-name="Text_20_body">→ 인간관계 +20</text:p>
      <text:p text:style-name="Text_20_body">→ 멘탈 +10</text:p>
      <text:p text:style-name="P26"/>
      <text:p text:style-name="P27">3. 그냥 집으로 간다.</text:p>
      <text:p text:style-name="P27">밖에서는 축제 음악이 들려왔다. </text:p>
      <text:p text:style-name="P27">하지만 나는 너무 피곤해서 빨리 집으로 가고 싶었다.</text:p>
      <text:p text:style-name="P28"><text:span text:style-name="T3">결과</text:span></text:p>
      <text:p text:style-name="Text_20_body">→ 멘탈 -5</text:p>
      <text:p text:style-name="Text_20_body">→ 인간관계 -5</text:p>
      <text:p text:style-name="P26"/>
      <text:p text:style-name="P5">12주차</text:p>
      <text:p text:style-name="P5">기말고사가 2주 앞으로 다가온 어느 날. </text:p>
      <text:p text:style-name="P5">알림이 쉴 새 없이 울리기 시작한다. </text:p>
      <text:p text:style-name="P5">띠링 </text:p>
      <text:p text:style-name="P5">과제 제출 D-3 </text:p>
      <text:p text:style-name="P5">띠링 </text:p>
      <text:p text:style-name="P5"><text:soft-page-break/>기말 프로젝트 발표 D-4 </text:p>
      <text:p text:style-name="P5">띠링 </text:p>
      <text:p text:style-name="P5">전공 보고서 제출 D-5 </text:p>
      <text:p text:style-name="P5">"잠깐..." </text:p>
      <text:p text:style-name="P5">"왜 다 이번 주야?" </text:p>
      <text:p text:style-name="P5"/>
      <text:h text:style-name="P19" text:outline-level="4"><text:span text:style-name="T4">1. </text:span>밤샘해서 전부 끝낸다 <text:span text:style-name="T4">(멘탈 30 이상)</text:span></text:h>
      <text:p text:style-name="Quotations">"이번 주만 버티자…"</text:p>
      <text:p text:style-name="Quotations">결과 </text:p>
      <text:list text:style-name="L3">
        <text:list-item>
          <text:p text:style-name="P30">학점 +15 </text:p>
        </text:list-item>
        <text:list-item>
          <text:p text:style-name="P29">멘탈 -20</text:p>
        </text:list-item>
      </text:list>
      <text:p text:style-name="P5"/>
      <text:h text:style-name="P19" text:outline-level="4"><text:span text:style-name="T4">2. </text:span>중요한 것만 챙긴다</text:h>
      <text:p text:style-name="Quotations">"줄 건 줘야지…"</text:p>
      <text:p text:style-name="Quotations">결과</text:p>
      <text:list text:style-name="L4">
        <text:list-item>
          <text:p text:style-name="P32">학점 +10 </text:p>
        </text:list-item>
        <text:list-item>
          <text:p text:style-name="P31">멘탈 -10</text:p>
        </text:list-item>
      </text:list>
      <text:h text:style-name="P20" text:outline-level="4">3. 친구와 작업하기 (친구 찬스 있을 시)</text:h>
      <text:p text:style-name="P33">“혼자하면 쓰러질지도 몰라.”</text:p>
      <text:p text:style-name="P33">결과 </text:p>
      <text:p text:style-name="P28"><text:span text:style-name="T5"><text:s text:c="10"/>학점 +10 </text:span></text:p>
      <text:list text:style-name="L12">
        <text:list-item>
          <text:p text:style-name="P35">인간관계 +10 </text:p>
        </text:list-item>
        <text:list-item>
          <text:p text:style-name="P34">멘탈 -5 </text:p>
        </text:list-item>
      </text:list>
      <text:p text:style-name="P28"><text:span text:style-name="T5"/></text:p>
      <text:p text:style-name="P5"/>
      <text:p text:style-name="P5"/>
      <text:p text:style-name="P5"/>
      <text:p text:style-name="P5">1<text:span text:style-name="T4">3</text:span>주차</text:p>
      <text:p text:style-name="P5"><text:soft-page-break/>기말고사 기간 시작 </text:p>
      <text:p text:style-name="P5">캠퍼스는 조용했다.</text:p>
      <text:p text:style-name="Text_20_body">축제 때 사람들로 가득했던 광장도.</text:p>
      <text:p text:style-name="Text_20_body">도서관도,</text:p>
      <text:p text:style-name="Text_20_body">카페도.</text:p>
      <text:p text:style-name="Text_20_body">전부 시험 공부를 하는 학생들로 가득 차 있었다.</text:p>
      <text:p text:style-name="P5">그렇게 마지막 시험 기간이 시작되었다.</text:p>
      <text:p text:style-name="Text_20_body">지난 3개월 동안 들었던 강의.</text:p>
      <text:p text:style-name="Text_20_body">수십 장의 PPT.</text:p>
      <text:p text:style-name="Text_20_body">끝없이 쌓인 전공 내용.</text:p>
      <text:p text:style-name="Text_20_body">모든 것이 시험지 위에 올라올 것이다.</text:p>
      <text:p text:style-name="P5">"드디어 마지막 관문이다." </text:p>
      <text:p text:style-name="P5"/>
      <text:p text:style-name="P27">1. 끝까지 최선을 다한다. (학점 30이상, 멘탈 40이상)</text:p>
      <text:p text:style-name="P5">시험 전날.</text:p>
      <text:p text:style-name="Text_20_body">나는 밤늦게까지 공부했다.</text:p>
      <text:p text:style-name="P5">"이 부분은 꼭 나온다." </text:p>
      <text:p text:style-name="P5">"이 공식도 외워야 하고..." </text:p>
      <text:p text:style-name="P5">잠은 부족했지만.</text:p>
      <text:p text:style-name="Text_20_body">이번만큼은 포기하고 싶지 않았다.</text:p>
      <text:p text:style-name="P5">시험 당일. </text:p>
      <text:p text:style-name="P5">시험지를 펼쳤다. </text:p>
      <text:p text:style-name="P5">"어?" </text:p>
      <text:p text:style-name="P5">생각보다 문제가 잘 풀렸다. </text:p>
      <text:p text:style-name="P5">한 문제.</text:p>
      <text:p text:style-name="Text_20_body">두 문제.</text:p>
      <text:p text:style-name="Text_20_body">세 문제.</text:p>
      <text:p text:style-name="P5">"할 만한데?" </text:p>
      <text:p text:style-name="P5">시험 종료. </text:p>
      <text:p text:style-name="P5"><text:soft-page-break/>강의실을 나오는 순간.</text:p>
      <text:p text:style-name="Text_20_body">묘한 성취감이 밀려왔다.</text:p>
      <text:p text:style-name="P5">결과</text:p>
      <text:p text:style-name="Text_20_body">→ 학점 +20</text:p>
      <text:p text:style-name="Text_20_body">→ 멘탈 -15</text:p>
      <text:p text:style-name="P5">"드디어 끝났다..." </text:p>
      <text:p text:style-name="P5"/>
      <text:p text:style-name="P27">2. 벼락치기를 시도한다.</text:p>
      <text:p text:style-name="P5">시험 하루 전. </text:p>
      <text:p text:style-name="P5">현재 시각</text:p>
      <text:p text:style-name="Text_20_body">오후 8시</text:p>
      <text:p text:style-name="P5">"왜 이렇게 범위가 많지?" </text:p>
      <text:p text:style-name="P5">새벽 2시 </text:p>
      <text:p text:style-name="P5">"큰일 났는데." </text:p>
      <text:p text:style-name="P5">새벽 5시 </text:p>
      <text:p text:style-name="P5">"이제 자면 안 되는 거 아니야?" </text:p>
      <text:p text:style-name="P5">시험장. </text:p>
      <text:p text:style-name="P5">첫 문제를 읽었다. </text:p>
      <text:p text:style-name="P5"/>
      <text:p text:style-name="P27">(학점 40 이상일 시)</text:p>
      <text:p text:style-name="P27">“생각보다 할 만 할지도…”</text:p>
      <text:p text:style-name="P27">두 번째 문제.</text:p>
      <text:p text:style-name="P27">“음… “</text:p>
      <text:p text:style-name="P27">많이 헷갈리기 시작했다.</text:p>
      <text:p text:style-name="P27">시험은 끝났지만 영혼도 함께 끝난 것 같았다. </text:p>
      <text:p text:style-name="P27">결과</text:p>
      <text:p text:style-name="Text_20_body">→ 학점 <text:span text:style-name="T4">+0</text:span></text:p>
      <text:p text:style-name="Text_20_body">→ 멘탈 -20</text:p>
      <text:p text:style-name="P27"/>
      <text:p text:style-name="P27"><text:soft-page-break/></text:p>
      <text:p text:style-name="P27">(학점 40미만일 시)</text:p>
      <text:p text:style-name="P5">"처음 보는 건데?" </text:p>
      <text:p text:style-name="P5">두 번째 문제. </text:p>
      <text:p text:style-name="P5">"이것도?" </text:p>
      <text:p text:style-name="P27">시험은 끝났지만 영혼도 함께 끝난 것 같았다. </text:p>
      <text:p text:style-name="P5">결과</text:p>
      <text:p text:style-name="Text_20_body">→ 학점 -10</text:p>
      <text:p text:style-name="Text_20_body">→ 멘탈 -20</text:p>
      <text:p text:style-name="P5">"다음 학기엔 진짜 미리 공부해야지." </text:p>
      <text:p text:style-name="P5"/>
      <text:p text:style-name="P27">3. 한 과목을 포기하고 나머지에 집중한다.</text:p>
      <text:p text:style-name="P27">"모든 걸 다 잘할 수는 없어." </text:p>
      <text:p text:style-name="P5">가장 자신 없는 과목 하나를 과감하게 포기했다.</text:p>
      <text:p text:style-name="Text_20_body">그 대신 다른 과목들에 모든 시간을 투자했다.</text:p>
      <text:p text:style-name="P5">시험은 예상보다 괜찮게 끝났다.</text:p>
      <text:p text:style-name="Text_20_body">하지만 포기한 과목은 처참했다.</text:p>
      <text:p text:style-name="P5">결과</text:p>
      <text:p text:style-name="Text_20_body">→ 학점 +5</text:p>
      <text:p text:style-name="Text_20_body">→ 멘탈 +5</text:p>
      <text:p text:style-name="P5"/>
      <text:p text:style-name="P5"/>
      <text:p text:style-name="P5"/>
      <text:p text:style-name="P5"/>
      <text:p text:style-name="P5">특별 이벤트 - 인간관계 80 이상 </text:p>
      <text:p text:style-name="P5">시험 종료 </text:p>
      <text:p text:style-name="P5">강의실 밖. </text:p>
      <text:p text:style-name="P5">동기의 부름에 나는 걸음을 서둘렀다.</text:p>
      <text:p text:style-name="P5">"끝났다." </text:p>
      <text:p text:style-name="P5"><text:soft-page-break/>"그러게." </text:p>
      <text:p text:style-name="P5">"입학한 게 엊그제 같은데 벌써 한 학기가 끝났네." </text:p>
      <text:p text:style-name="P5">“...”</text:p>
      <text:p text:style-name="P5">"고생 많았어." </text:p>
      <text:p text:style-name="P5"/>
      <text:p text:style-name="P5"><text:span text:style-name="T4">1. </text:span>같이 밥 먹으러 간다 <text:span text:style-name="T4">(소지금 10 이상)</text:span></text:p>
      <text:p text:style-name="P5">나는 동기와 함께 밥을 먹으러 갔다.</text:p>
      <text:p text:style-name="P5">어쩌면 서로 더 각별한 사이가 된 것 같다.</text:p>
      <text:p text:style-name="P5"/>
      <text:p text:style-name="Text_20_body">→ 인간관계 +10</text:p>
      <text:p text:style-name="Text_20_body">→ 멘탈 +10</text:p>
      <text:p text:style-name="Text_20_body">→ 소지금 -<text:span text:style-name="T4">10</text:span></text:p>
      <text:p text:style-name="Text_20_body"/>
      <text:p text:style-name="P5"><text:span text:style-name="T4">2. </text:span>집으로 간다</text:p>
      <text:p text:style-name="P5">나는 간단한 인사를 마치고 피로한 몸을 이끌며 집으로 갔다.</text:p>
      <text:p text:style-name="Text_20_body">→ 멘탈 +5</text:p>
      <text:p text:style-name="P5"/>
      <text:p text:style-name="P5"/>
      <text:p text:style-name="P5"/>
      <text:p text:style-name="P5">이렇게 길고도 길었던 1학기 마지막 시험이 끝났다. </text:p>
      <text:p text:style-name="P5"/>
      <text:p text:style-name="P5"/>
      <text:p text:style-name="P27">15주차 (1차 결과)</text:p>
      <text:p text:style-name="P27"/>
      <text:p text:style-name="P27">학점에 따른 점수 → A+, A, B+, B, C+, C 로 나누기</text:p>
      <text:p text:style-name="P27">총 멘탈, 인간관계, 소지금 보여주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KR" fo:font-size="12pt" fo:language="en" fo:country="US" style:letter-kerning="true" style:font-name-asian="Noto Serif KR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KR" fo:font-size="12pt" fo:language="en" fo:country="US" style:letter-kerning="true" style:font-name-asian="Noto Serif KR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KR1" style:font-family-asian="'Noto Serif KR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KR1" style:font-family-asian="'Noto Serif KR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KR1" style:font-family-asian="'Noto Serif KR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KR1" style:font-family-asian="'Noto Serif KR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30T14:47:06.699000000</meta:creation-date>
    <dc:date>2026-05-30T16:42:33.672000000</dc:date>
    <meta:editing-duration>PT1H37M28S</meta:editing-duration>
    <meta:editing-cycles>2</meta:editing-cycles>
    <meta:generator>Docx_Editor_PLUS/1.0.0.0$Windows_X86_64 LibreOffice_project/</meta:generator>
    <meta:document-statistic meta:table-count="0" meta:image-count="0" meta:object-count="0" meta:page-count="21" meta:paragraph-count="542" meta:word-count="5551" meta:character-count="7592" meta:non-whitespace-character-count="5941"/>
  </office:meta>
</office:document-meta>
</file>